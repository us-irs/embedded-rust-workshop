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1D2261FA128.png" manifest:media-type="image/png"/>
  <manifest:file-entry manifest:full-path="Pictures/10000001000000880000008850D49839.png" manifest:media-type="image/png"/>
  <manifest:file-entry manifest:full-path="Pictures/100000010000013200000113D2BB5EF3.png" manifest:media-type="image/png"/>
  <manifest:file-entry manifest:full-path="Pictures/1000000100000400000002AB6D601A33.png" manifest:media-type="image/png"/>
  <manifest:file-entry manifest:full-path="Pictures/100000010000020000000200AA238537.png" manifest:media-type="image/png"/>
  <manifest:file-entry manifest:full-path="Pictures/10000001000001CC0000013351C7EBB2.png" manifest:media-type="image/png"/>
  <manifest:file-entry manifest:full-path="Pictures/100000010000010000000100765326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6.60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8.80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pr1" style:family="presentation" style:parent-style-name="Default-title">
      <style:graphic-properties fo:min-height="11.43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6.01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1.276cm" loext:decorative="false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254cm" fo:margin-bottom="0cm" fo:text-align="left"/>
    </style:style>
    <style:style style:name="P5" style:family="paragraph">
      <loext:graphic-properties draw:fill-color="#ffffff"/>
      <style:paragraph-properties fo:margin-top="0.254cm" fo:margin-bottom="0cm" fo:text-align="left"/>
      <style:text-properties fo:font-size="28pt" style:font-size-asian="28pt" style:font-size-complex="28pt"/>
    </style:style>
    <style:style style:name="P6" style:family="paragraph">
      <style:paragraph-properties fo:margin-top="0.356cm" fo:margin-bottom="0cm"/>
    </style:style>
    <style:style style:name="P7" style:family="paragraph">
      <loext:graphic-properties draw:fill="none"/>
      <style:paragraph-properties fo:margin-top="0.152cm" fo:margin-bottom="0cm"/>
    </style:style>
    <style:style style:name="P8" style:family="paragraph">
      <style:paragraph-properties fo:margin-left="0cm" fo:margin-right="0cm" fo:margin-top="0.152cm" fo:margin-bottom="0cm" fo:line-height="100%" fo:text-indent="0cm"/>
    </style:style>
    <style:style style:name="P9" style:family="paragraph">
      <loext:graphic-properties draw:fill-color="#ffffff"/>
      <style:text-properties fo:font-size="22pt" style:font-size-asian="22pt" style:font-size-complex="22pt"/>
    </style:style>
    <style:style style:name="P10" style:family="paragraph">
      <style:paragraph-properties fo:text-align="left"/>
    </style:style>
    <style:style style:name="P11" style:family="paragraph">
      <loext:graphic-properties draw:fill-color="#ffffff"/>
      <style:paragraph-properties fo:text-align="left"/>
      <style:text-properties fo:font-size="28pt" style:font-size-asian="28pt" style:font-size-complex="28pt"/>
    </style:style>
    <style:style style:name="P12" style:family="paragraph">
      <style:paragraph-properties fo:margin-top="0.254cm" fo:margin-bottom="0cm"/>
    </style:style>
    <style:style style:name="P13" style:family="paragraph">
      <loext:graphic-properties draw:fill="none"/>
      <style:paragraph-properties fo:margin-top="0.254cm" fo:margin-bottom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top="0.254cm" fo:margin-bottom="0cm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margin-top="0.254cm" fo:margin-bottom="0cm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margin-top="0.254cm" fo:margin-bottom="0cm"/>
      <style:text-properties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Mono" fo:font-size="28pt" style:font-size-asian="28pt" style:font-size-complex="28pt"/>
    </style:style>
    <style:style style:name="T7" style:family="text">
      <style:text-properties style:font-name="Liberation Mono"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0.825cm" svg:height="11.437cm" svg:x="3.305cm" svg:y="0cm" presentation:class="title" presentation:user-transformed="true">
          <draw:text-box>
            <text:p><text:span text:style-name="T1">Embedded </text:span><text:span text:style-name="T1">Rust Workshop</text:span></text:p>
          </draw:text-box>
        </draw:frame>
        <draw:frame draw:style-name="gr1" draw:text-style-name="P2" draw:layer="layout" svg:width="3.81cm" svg:height="3.81cm" svg:x="8.89cm" svg:y="10.16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3.814cm" svg:x="13.335cm" svg:y="10.156cm">
          <draw:image xlink:href="Pictures/10000001000001CC0000013351C7EB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0.201cm" svg:y="0.628cm" presentation:class="title" presentation:user-transformed="true">
          <draw:text-box>
            <text:p>What is (or Why) Rust?</text:p>
          </draw:text-box>
        </draw:frame>
        <draw:frame presentation:style-name="pr4" draw:text-style-name="P5" draw:layer="layout" svg:width="19.555cm" svg:height="6.01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eveloped at Mozilla to address shortcomings of C and C++</text:span></text:p>
              </text:list-item>
              <text:list-item>
                <text:p text:style-name="P4"><text:span text:style-name="T2">Promises: Reliability, Performance and Productivity</text:span></text:p>
                <text:p text:style-name="P4"><text:span text:style-name="T2"/></text:p>
              </text:list-item>
            </text:list>
          </draw:text-box>
        </draw:frame>
        <draw:frame draw:style-name="gr1" draw:text-style-name="P2" draw:layer="layout" svg:width="4.55cm" svg:height="4.55cm" svg:x="22.12cm" svg:y="1.8cm">
          <draw:image xlink:href="Pictures/100000010000020000000200AA238537.png" xlink:type="simple" xlink:show="embed" xlink:actuate="onLoad" draw:mime-type="image/png">
            <text:p/>
          </draw:image>
        </draw:frame>
        <draw:frame draw:style-name="gr3" draw:text-style-name="P7" draw:layer="layout" svg:width="20.402cm" svg:height="6.857cm" svg:x="1.27cm" svg:y="8.383cm">
          <draw:text-box>
            <text:list text:style-name="L1">
              <text:list-item>
                <text:p text:style-name="P6"><text:span text:style-name="T2">Capable of eliminating memory-safety errors at compile time</text:span></text:p>
              </text:list-item>
              <text:list-item>
                <text:p text:style-name="P6"><text:span text:style-name="T2">Excellent tooling: cargo as the integrated build system and package manager</text:span></text:p>
              </text:list-item>
            </text:list>
          </draw:text-box>
        </draw:frame>
        <draw:frame draw:style-name="gr1" draw:text-style-name="P2" draw:layer="layout" svg:width="6.682cm" svg:height="6.005cm" svg:x="20.955cm" svg:y="7.33cm">
          <draw:image xlink:href="Pictures/100000010000013200000113D2BB5E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list text:style-name="L1">
                <text:list-item>
                  <text:p text:style-name="P8"><text:span text:style-name="T3">Reliability: Avoid memory-safety errors, more robust code due to good type system</text:span></text:p>
                </text:list-item>
                <text:list-item>
                  <text:p text:style-name="P8"><text:span text:style-name="T3">Performance: Compiled language which can achieve similar performance characteristics as C (native performance)</text:span></text:p>
                </text:list-item>
                <text:list-item>
                  <text:p text:style-name="P8"><text:span text:style-name="T4">Productivity: After the initial learning curve, you will be faster than with other technologies, due to the excellent tooling and the high trust you can put in compiling code. </text:span><text:span text:style-name="T3">Capable type-system with excellent modelling capabilities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Rust on Embedded</text:p>
          </draw:text-box>
        </draw:frame>
        <draw:frame presentation:style-name="pr5" draw:text-style-name="P11" draw:layer="layout" svg:width="19.05cm" svg:height="11.276cm" svg:x="1.471cm" svg:y="3.329cm" presentation:class="subtitle" presentation:user-transformed="true">
          <draw:text-box>
            <text:list text:style-name="L1">
              <text:list-item>
                <text:p text:style-name="P10"><text:span text:style-name="T2">Rust language design and capabilities make it viable for </text:span><text:span text:style-name="T2">embedded!</text:span></text:p>
                <text:p text:style-name="P10"><text:span text:style-name="T2"/></text:p>
              </text:list-item>
            </text:list>
          </draw:text-box>
        </draw:frame>
        <draw:frame draw:style-name="gr1" draw:text-style-name="P2" draw:layer="layout" svg:width="3.597cm" svg:height="3.597cm" svg:x="22.86cm" svg:y="5.08cm">
          <draw:image xlink:href="Pictures/10000001000000880000008850D49839.png" xlink:type="simple" xlink:show="embed" xlink:actuate="onLoad" draw:mime-type="image/png">
            <text:p/>
          </draw:image>
        </draw:frame>
        <draw:frame draw:style-name="gr1" draw:text-style-name="P2" draw:layer="layout" svg:width="5.08cm" svg:height="3.388cm" svg:x="21.59cm" svg:y="1.27cm">
          <draw:image xlink:href="Pictures/1000000100000400000002AB6D601A33.png" xlink:type="simple" xlink:show="embed" xlink:actuate="onLoad" draw:mime-type="image/png">
            <text:p/>
          </draw:image>
        </draw:frame>
        <draw:frame draw:style-name="gr4" draw:text-style-name="P13" draw:layer="layout" svg:width="22.225cm" svg:height="9.059cm" svg:x="1.27cm" svg:y="5.715cm">
          <draw:text-box>
            <text:list text:style-name="L1">
              <text:list-item>
                <text:p text:style-name="P12"><text:span text:style-name="T2">Embedded Rust is generally supported on all LLVM supported architectures</text:span></text:p>
              </text:list-item>
              <text:list-item>
                <text:p text:style-name="P12"><text:span text:style-name="T2">The Rust ecosystem for the most commonly used architectures and microcontroller vendors is excellent, and is free open-source software!</text:span></text:p>
              </text:list-item>
              <text:list-item>
                <text:p text:style-name="P12"><text:span text:style-name="T2">We are working on improving that ecosystem for more exotic vendor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1.905cm" svg:y="14.576cm" presentation:class="notes" presentation:user-transformed="true">
            <draw:text-box>
              <text:list text:style-name="L1">
                <text:list-item>
                  <text:p><text:s/>Rust is a compiled high-performance language with allows low-level memory control</text:p>
                </text:list-item>
                <text:list-item>
                  <text:p><text:s/>Rust uses the LLVM compiler backend</text:p>
                </text:list-item>
                <text:list-item>
                  <text:p><text:s/>LLVM supports a lot of architectures</text:p>
                </text:list-item>
                <text:list-item>
                  <text:p><text:s/>Common MCU architectures: ARM, RISC-V</text:p>
                </text:list-item>
                <text:list-item>
                  <text:p><text:s/>Common MCU vendors: STM32, nordic, espressif</text:p>
                </text:list-item>
                <text:list-item>
                  <text:p text:style-name="P14">Majority of is free open-source software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The Embedded Rust Ecosystem</text:p>
          </draw:text-box>
        </draw:frame>
        <draw:frame draw:style-name="gr1" draw:text-style-name="P2" draw:layer="layout" svg:width="3.81cm" svg:height="3.81cm" svg:x="22.86cm" svg:y="3.264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4.878cm" svg:height="3.175cm" svg:x="22.427cm" svg:y="8.255cm">
          <draw:image xlink:href="Pictures/10000001000002CC000001D2261FA128.png" xlink:type="simple" xlink:show="embed" xlink:actuate="onLoad" draw:mime-type="image/png">
            <text:p/>
          </draw:image>
        </draw:frame>
        <draw:frame draw:style-name="gr5" draw:text-style-name="P15" draw:layer="layout" svg:width="20.955cm" svg:height="10.16cm" svg:x="0.966cm" svg:y="3.537cm">
          <draw:text-box>
            <text:list text:style-name="L1">
              <text:list-item>
                <text:p text:style-name="P12"><text:span text:style-name="T2">The Embedded Rust Working Group maintains various “blessed” crates</text:span></text:p>
              </text:list-item>
              <text:list-item>
                <text:p text:style-name="P12"><text:span text:style-name="T2">The knurling-rs project also maintains various crates popular in the embedded Rust community</text:span></text:p>
              </text:list-item>
              <text:list-item>
                <text:p text:style-name="P12"><text:span text:style-name="T2">All of this is free open-source software as well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5">probe-rs is a capable flashing library and tool which also allow RAM manipulation</text:span></text:p>
                </text:list-item>
                <text:list-item>
                  <text:p text:style-name="P14"><text:span text:style-name="T5">defmt is an excellent logging library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Embassy</text:p>
          </draw:text-box>
        </draw:frame>
        <draw:frame draw:style-name="gr5" draw:text-style-name="P15" draw:layer="layout" svg:width="25.704cm" svg:height="11.264cm" svg:x="0.966cm" svg:y="3.175cm">
          <draw:text-box>
            <text:list text:style-name="L1">
              <text:list-item>
                <text:p text:style-name="P12"><text:span text:style-name="T2">Embassy is an asynchronous framework for embedded Rust</text:span></text:p>
              </text:list-item>
              <text:list-item>
                <text:p text:style-name="P12"><text:span text:style-name="T2">It simplifies multi-tasking on microcontrollers by utilizing the </text:span><text:span text:style-name="T6">async</text:span><text:span text:style-name="T2"> / </text:span><text:span text:style-name="T6">await</text:span><text:span text:style-name="T2"> syntax integrated in Rust</text:span></text:p>
              </text:list-item>
              <text:list-item>
                <text:p text:style-name="P12"><text:span text:style-name="T2">Core components: Executor, time libraries and hardware abstraction layers (HALs)</text:span></text:p>
              </text:list-item>
              <text:list-item>
                <text:p text:style-name="P12"><text:span text:style-name="T2">Standard executor follows the co-operative multi-tasking model</text:span></text:p>
              </text:list-item>
              <text:list-item>
                <text:p text:style-name="P12"><text:span text:style-name="T2">Interrupt executor allows pre-emption with task priori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Goal of this workshop</text:p>
          </draw:text-box>
        </draw:frame>
        <draw:frame draw:style-name="gr5" draw:text-style-name="P17" draw:layer="layout" svg:width="20.955cm" svg:height="10.16cm" svg:x="1.27cm" svg:y="3.81cm">
          <draw:text-box>
            <text:list text:style-name="L1">
              <text:list-item>
                <text:p text:style-name="P12"><text:span text:style-name="T5">Extract relevant information from datasheets and/or schematics</text:span></text:p>
              </text:list-item>
              <text:list-item>
                <text:p text:style-name="P12"><text:span text:style-name="T5">Understand and work in embedded code using the embassy asynchronous runtime, which includes using the </text:span><text:span text:style-name="T7">async</text:span><text:span text:style-name="T5"> /</text:span><text:span text:style-name="T7"> await</text:span><text:span text:style-name="T5"> syntax</text:span></text:p>
              </text:list-item>
              <text:list-item>
                <text:p text:style-name="P12"><text:span text:style-name="T5">Schedule concurrent tasks using embassy</text:span></text:p>
              </text:list-item>
              <text:list-item>
                <text:p text:style-name="P12"><text:span text:style-name="T5">Using embassy-time to perform delays and periodic operations or measure elapsed time.</text:span></text:p>
              </text:list-item>
              <text:list-item>
                <text:p text:style-name="P12"><text:span text:style-name="T5">Write drivers for simple senso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5">Peripheral examples: UART, SPI or Timer peripheral</text:span></text:p>
                </text:list-item>
                <text:list-item>
                  <text:p text:style-name="P14"><text:span text:style-name="T5">Processor: Cortex-M4 used on the microbit v2</text:span></text:p>
                </text:list-item>
                <text:list-item>
                  <text:p text:style-name="P14"><text:span text:style-name="T5">MCU: The microbit v2 uses the nRF52833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Non-goals and further materials</text:p>
          </draw:text-box>
        </draw:frame>
        <draw:frame draw:style-name="gr5" draw:text-style-name="P18" draw:layer="layout" svg:width="25.4cm" svg:height="10.178cm" svg:x="1.27cm" svg:y="3.81cm">
          <draw:text-box>
            <text:list text:style-name="L1">
              <text:list-item>
                <text:p text:style-name="P12"><text:span text:style-name="T8">This workshop has a </text:span><text:span text:style-name="T9">strong </text:span><text:span text:style-name="T10">focus on the practical side of writing embedded Rust.</text:span></text:p>
              </text:list-item>
              <text:list-item>
                <text:p text:style-name="P12"><text:span text:style-name="T8">This does not replace a solid theoretical foundation on Rust and on Embedded Systems.</text:span></text:p>
              </text:list-item>
              <text:list-item>
                <text:p text:style-name="P12"><text:span text:style-name="T8">However, you can still work through this workshop, but it might be harder or more confusing.</text:span></text:p>
              </text:list-item>
              <text:list-item>
                <text:p text:style-name="P12"><text:span text:style-name="T8">If you are a Rust beginner, working through the Rust book is </text:span><text:span text:style-name="T9">strongly</text:span><text:span text:style-name="T8"> recommended.</text:span></text:p>
              </text:list-item>
              <text:list-item>
                <text:p text:style-name="P12"><text:span text:style-name="T8">We will try to provide relevant embedded knowledge in the exercise materials.</text:span></text:p>
              </text:list-item>
              <text:list-item>
                <text:p text:style-name="P12"><text:span text:style-name="T8">The exercise book contains further material recommenda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5">Peripheral examples: UART, SPI or Timer peripheral</text:span></text:p>
                </text:list-item>
                <text:list-item>
                  <text:p text:style-name="P14"><text:span text:style-name="T5">Processor: Cortex-M4 used on the microbit v2</text:span></text:p>
                </text:list-item>
                <text:list-item>
                  <text:p text:style-name="P14"><text:span text:style-name="T5">MCU: The microbit v2 uses the nRF52833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Let’s start!</text:p>
          </draw:text-box>
        </draw:frame>
        <draw:frame draw:style-name="gr5" draw:text-style-name="P17" draw:layer="layout" svg:width="25.4cm" svg:height="10.16cm" svg:x="1.27cm" svg:y="3.81cm">
          <draw:text-box>
            <text:list text:style-name="L1">
              <text:list-item>
                <text:p text:style-name="P12"><text:span text:style-name="T5">Go to the exercise book which is hosted on xyz and start with the preparation if you have not done it yet</text:span></text:p>
              </text:list-item>
              <text:list-item>
                <text:p text:style-name="P12"><text:span text:style-name="T5">The book contains all instructions to clone the exercise repository</text:span></text:p>
              </text:list-item>
              <text:list-item>
                <text:p text:style-name="P12"><text:span text:style-name="T5">The repository contains all components of this workshop</text:span></text:p>
              </text:list-item>
              <text:list-item>
                <text:p text:style-name="P12"><text:span text:style-name="T5">The source code for the exercise book is part of the repository</text:span></text:p>
              </text:list-item>
              <text:list-item>
                <text:p text:style-name="P12"><text:span text:style-name="T5">If you are interested in advanced theoretical knowledge and links to further material, check the book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5">Peripheral examples: UART, SPI or Timer peripheral</text:span></text:p>
                </text:list-item>
                <text:list-item>
                  <text:p text:style-name="P14"><text:span text:style-name="T5">Processor: Cortex-M4 used on the microbit v2</text:span></text:p>
                </text:list-item>
                <text:list-item>
                  <text:p text:style-name="P14"><text:span text:style-name="T5">MCU: The microbit v2 uses the nRF52833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10:47:40.029296242</meta:creation-date>
    <dc:date>2026-06-11T20:44:50.389023615</dc:date>
    <meta:editing-duration>PT1H23M55S</meta:editing-duration>
    <meta:editing-cycles>19</meta:editing-cycles>
    <meta:generator>LibreOffice/26.2.3.2$Linux_X86_64 LibreOffice_project/70e089b17412e4cb7773e41413306b17a2328c34</meta:generator>
    <meta:document-statistic meta:object-count="62"/>
  </office:meta>
</office:document-meta>
</file>