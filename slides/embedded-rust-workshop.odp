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A000002D8FE7052DE.png" manifest:media-type="image/png"/>
  <manifest:file-entry manifest:full-path="Pictures/10000001000000880000008850D49839.png" manifest:media-type="image/png"/>
  <manifest:file-entry manifest:full-path="Pictures/100000010000013200000113D2BB5EF3.png" manifest:media-type="image/png"/>
  <manifest:file-entry manifest:full-path="Pictures/100000010000020000000200AA238537.png" manifest:media-type="image/png"/>
  <manifest:file-entry manifest:full-path="Pictures/10000001000001CC0000013351C7EBB2.png" manifest:media-type="image/png"/>
  <manifest:file-entry manifest:full-path="Pictures/100000010000010000000100765326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7.24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244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6.607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211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8.80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53cm, 3.39cm, 2.284cm, 2.67cm)" draw:image-opacity="100%" style:mirror="none" loext:decorative="false"/>
    </style:style>
    <style:style style:name="gr9" style:family="graphic" style:parent-style-name="standard">
      <style:graphic-properties draw:stroke="none" draw:fill="none" fo:min-height="0.727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9.91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484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11.014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1.014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9.928cm" loext:decorative="false"/>
      <style:paragraph-properties style:writing-mode="lr-tb"/>
    </style:style>
    <style:style style:name="pr1" style:family="presentation" style:parent-style-name="Default-title">
      <style:graphic-properties fo:min-height="11.437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6.014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1.276cm" loext:decorative="false"/>
      <style:paragraph-properties style:writing-mode="lr-tb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left" fo:text-indent="0cm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top="0.254cm" fo:margin-bottom="0cm" fo:text-align="left"/>
    </style:style>
    <style:style style:name="P8" style:family="paragraph">
      <loext:graphic-properties draw:fill-color="#ffffff"/>
      <style:paragraph-properties fo:margin-top="0.254cm" fo:margin-bottom="0cm" fo:text-align="left"/>
      <style:text-properties fo:font-size="28pt" style:font-size-asian="28pt" style:font-size-complex="28pt"/>
    </style:style>
    <style:style style:name="P9" style:family="paragraph">
      <style:paragraph-properties fo:margin-top="0.356cm" fo:margin-bottom="0cm"/>
    </style:style>
    <style:style style:name="P10" style:family="paragraph">
      <loext:graphic-properties draw:fill="none"/>
      <style:paragraph-properties fo:margin-top="0.152cm" fo:margin-bottom="0cm"/>
    </style:style>
    <style:style style:name="P11" style:family="paragraph">
      <style:paragraph-properties fo:text-align="left"/>
    </style:style>
    <style:style style:name="P12" style:family="paragraph">
      <loext:graphic-properties draw:fill="none"/>
      <style:paragraph-properties fo:text-align="lef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3" style:family="paragraph">
      <style:paragraph-properties fo:margin-left="0cm" fo:margin-right="0cm" fo:margin-top="0.152cm" fo:margin-bottom="0cm" fo:line-height="100%" fo:text-indent="0cm"/>
    </style:style>
    <style:style style:name="P14" style:family="paragraph">
      <loext:graphic-properties draw:fill-color="#ffffff"/>
      <style:text-properties fo:font-size="22pt" style:font-size-asian="22pt" style:font-size-complex="22pt"/>
    </style:style>
    <style:style style:name="P15" style:family="paragraph">
      <loext:graphic-properties draw:fill-color="#ffffff"/>
      <style:paragraph-properties fo:text-align="left"/>
      <style:text-properties fo:font-size="28pt" style:font-size-asian="28pt" style:font-size-complex="28pt"/>
    </style:style>
    <style:style style:name="P16" style:family="paragraph">
      <style:paragraph-properties fo:margin-top="0.254cm" fo:margin-bottom="0cm"/>
    </style:style>
    <style:style style:name="P17" style:family="paragraph">
      <loext:graphic-properties draw:fill="none"/>
      <style:paragraph-properties fo:margin-top="0.254cm" fo:margin-bottom="0cm"/>
    </style:style>
    <style:style style:name="P18" style:family="paragraph">
      <style:paragraph-properties fo:margin-left="0cm" fo:margin-right="0cm" fo:line-height="100%" fo:text-align="left" fo:text-indent="0cm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fo:margin-top="0.254cm" fo:margin-bottom="0cm"/>
      <style:text-properties fo:font-size="28pt" style:font-size-asian="28pt" style:font-size-complex="28pt"/>
    </style:style>
    <style:style style:name="P21" style:family="paragraph">
      <loext:graphic-properties draw:fill-color="#ffffff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.254cm" fo:margin-bottom="0cm" fo:line-height="100%" fo:text-indent="0cm"/>
      <style:text-properties fo:font-size="28pt"/>
    </style:style>
    <style:style style:name="P23" style:family="paragraph">
      <loext:graphic-properties draw:fill="none"/>
      <style:paragraph-properties fo:margin-left="0cm" fo:margin-right="0cm" fo:margin-top="0.254cm" fo:margin-bottom="0cm" fo:line-height="100%" fo:text-indent="0cm"/>
      <style:text-properties fo:font-size="28pt" style:font-size-asian="28pt" style:font-size-complex="28pt"/>
    </style:style>
    <style:style style:name="P24" style:family="paragraph">
      <style:paragraph-properties fo:margin-left="0cm" fo:margin-right="0cm" fo:margin-top="0.254cm" fo:margin-bottom="0cm" fo:line-height="100%" fo:text-indent="0cm"/>
    </style:style>
    <style:style style:name="P25" style:family="paragraph">
      <style:paragraph-properties fo:margin-top="0.254cm" fo:margin-bottom="0cm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.254cm" fo:margin-bottom="0cm" fo:line-height="100%" fo:text-indent="0cm"/>
      <style:text-properties fo:font-size="20pt" style:font-size-asian="20pt" style:font-size-complex="20pt"/>
    </style:style>
    <style:style style:name="P27" style:family="paragraph">
      <loext:graphic-properties draw:fill="none"/>
      <style:paragraph-properties fo:margin-top="0.254cm" fo:margin-bottom="0cm"/>
      <style:text-properties fo:font-size="20pt" style:font-size-asian="20pt" style:font-size-complex="20pt"/>
    </style:style>
    <style:style style:name="P28" style:family="paragraph">
      <style:paragraph-properties fo:margin-top="0.254cm" fo:margin-bottom="0cm"/>
      <style:text-properties fo:font-size="18pt" style:font-size-asian="18pt" style:font-size-complex="18pt"/>
    </style:style>
    <style:style style:name="P29" style:family="paragraph">
      <loext:graphic-properties draw:fill="none"/>
      <style:paragraph-properties fo:margin-top="0.254cm" fo:margin-bottom="0cm"/>
      <style:text-properties fo:font-size="18pt" style:font-size-asian="18pt" style:font-size-complex="18pt"/>
    </style:style>
    <style:style style:name="P30" style:family="paragraph">
      <loext:graphic-properties draw:fill="none"/>
      <style:paragraph-properties fo:margin-top="0.254cm" fo:margin-bottom="0cm"/>
      <style:text-properties fo:font-size="24pt" style:font-size-asian="24pt" style:font-size-complex="24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6pt" fo:font-style="normal" fo:text-shadow="none" style:text-underline-style="none" fo:font-weight="normal" style:letter-kerning="true" style:font-name-asian="Liberation Mono1" style:font-size-asian="6pt" style:font-style-asian="normal" style:font-weight-asian="normal" style:font-name-complex="Liberation Mono1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Mono1" fo:font-size="6pt" style:font-name-asian="Liberation Mono1" style:font-size-asian="6pt" style:font-name-complex="Liberation Mono1" style:font-size-complex="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Mono" fo:font-size="28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Liberation Mono"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awdwa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0.825cm" svg:height="11.437cm" svg:x="3.305cm" svg:y="0cm" presentation:class="title" presentation:user-transformed="true">
          <draw:text-box>
            <text:p><text:span text:style-name="T1">Emb</text:span><text:span text:style-name="T1">edde</text:span><text:span text:style-name="T1">d </text:span><text:span text:style-name="T1">Rust </text:span><text:span text:style-name="T1">Work</text:span><text:span text:style-name="T1">shop</text:span></text:p>
          </draw:text-box>
        </draw:frame>
        <draw:frame draw:style-name="gr1" draw:text-style-name="P2" draw:layer="layout" svg:width="3.81cm" svg:height="3.81cm" svg:x="14.605cm" svg:y="9.525cm">
          <draw:image xlink:href="Pictures/1000000100000100000001007653269C.png" xlink:type="simple" xlink:show="embed" xlink:actuate="onLoad" draw:mime-type="image/png">
            <text:p/>
          </draw:image>
        </draw:frame>
        <draw:frame draw:style-name="gr1" draw:text-style-name="P2" draw:layer="layout" svg:width="5.715cm" svg:height="3.814cm" svg:x="7.62cm" svg:y="9.525cm">
          <draw:image xlink:href="Pictures/10000001000001CC0000013351C7EBB2.png" xlink:type="simple" xlink:show="embed" xlink:actuate="onLoad" draw:mime-type="image/png">
            <text:p/>
          </draw:image>
        </draw:frame>
        <draw:frame draw:style-name="gr2" draw:text-style-name="P4" draw:layer="layout" svg:width="7.742cm" svg:height="0.735cm" svg:x="20.237cm" svg:y="14.703cm">
          <draw:text-box>
            <text:p text:style-name="P3"><text:span text:style-name="T2">[1] Ferris the crab — rustacean.net — CC0 (public domain)</text:span><text:span text:style-name="T2"><text:line-break/></text:span><text:span text:style-name="T3">[2] Embedded Rust — CC-BY</text:span></text:p>
          </draw:text-box>
        </draw:frame>
        <draw:frame draw:style-name="gr3" draw:text-style-name="P5" draw:layer="layout" svg:width="0.883cm" svg:height="0.494cm" svg:x="12.61cm" svg:y="12.595cm">
          <draw:text-box>
            <text:p><text:span text:style-name="T2">[1]</text:span></text:p>
          </draw:text-box>
        </draw:frame>
        <draw:frame draw:style-name="gr3" draw:text-style-name="P5" draw:layer="layout" svg:width="0.883cm" svg:height="0.494cm" svg:x="18.415cm" svg:y="12.841cm">
          <draw:text-box>
            <text:p><text:span text:style-name="T2">[2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>
            <draw:text-box>
              <text:p>- Workshop is done because there are not a lot of Rust focused courses yet</text:p>
            </draw:text-box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0.201cm" svg:y="0.628cm" presentation:class="title" presentation:user-transformed="true">
          <draw:text-box>
            <text:p>What is (or Why) Rust?</text:p>
          </draw:text-box>
        </draw:frame>
        <draw:frame presentation:style-name="pr4" draw:text-style-name="P8" draw:layer="layout" svg:width="19.555cm" svg:height="6.014cm" svg:x="1.4cm" svg:y="3.685cm" presentation:class="subtitle" presentation:user-transformed="true">
          <draw:text-box>
            <text:list text:style-name="L1">
              <text:list-item>
                <text:p text:style-name="P7"><text:span text:style-name="T4">Developed at Mozilla to address shortcomings of C and C++</text:span></text:p>
              </text:list-item>
              <text:list-item>
                <text:p text:style-name="P7"><text:span text:style-name="T4">Promises: Reliability, Performance and Productivity</text:span></text:p>
                <text:p text:style-name="P7"><text:span text:style-name="T4"/></text:p>
              </text:list-item>
            </text:list>
          </draw:text-box>
        </draw:frame>
        <draw:frame draw:style-name="gr1" draw:text-style-name="P2" draw:layer="layout" svg:width="4.55cm" svg:height="4.55cm" svg:x="22.12cm" svg:y="1.8cm">
          <draw:image xlink:href="Pictures/100000010000020000000200AA238537.png" xlink:type="simple" xlink:show="embed" xlink:actuate="onLoad" draw:mime-type="image/png">
            <text:p/>
          </draw:image>
        </draw:frame>
        <draw:frame draw:style-name="gr5" draw:text-style-name="P10" draw:layer="layout" svg:width="20.402cm" svg:height="6.857cm" svg:x="1.27cm" svg:y="8.383cm">
          <draw:text-box>
            <text:list text:style-name="L1">
              <text:list-item>
                <text:p text:style-name="P9"><text:span text:style-name="T4">Capable of eliminating memory-safety errors </text:span><text:span text:style-name="T4">at compile time</text:span></text:p>
              </text:list-item>
              <text:list-item>
                <text:p text:style-name="P9"><text:span text:style-name="T4">Excellent tooling: cargo as the integrated </text:span><text:span text:style-name="T4">build system and package manager</text:span></text:p>
              </text:list-item>
            </text:list>
          </draw:text-box>
        </draw:frame>
        <draw:frame draw:style-name="gr1" draw:text-style-name="P2" draw:layer="layout" svg:width="6.682cm" svg:height="6.005cm" svg:x="20.955cm" svg:y="7.33cm">
          <draw:image xlink:href="Pictures/100000010000013200000113D2BB5EF3.png" xlink:type="simple" xlink:show="embed" xlink:actuate="onLoad" draw:mime-type="image/png">
            <text:p/>
          </draw:image>
        </draw:frame>
        <draw:frame draw:style-name="gr6" draw:text-style-name="P12" draw:layer="layout" svg:width="12.7cm" svg:height="1.461cm" svg:x="18.126cm" svg:y="14.561cm">
          <draw:text-box>
            <text:p text:style-name="P11"><text:span text:style-name="T2">[1] Rust logo — rustacean.net — CC0 (public domain)</text:span><text:span text:style-name="T2"><text:line-break/></text:span><text:span text:style-name="T3">[2] crates.io logo — rust-lang/crates.io (github.com/rust-lang/crates.io) </text:span><text:span text:style-name="T3"><text:line-break/></text:span><text:span text:style-name="T3"> <text:s text:c="3"/>Licensed under MIT / Apache 2.0 — Rust Foundation trademark</text:span></text:p>
          </draw:text-box>
        </draw:frame>
        <draw:frame draw:style-name="gr3" draw:text-style-name="P5" draw:layer="layout" svg:width="0.883cm" svg:height="0.494cm" svg:x="25.915cm" svg:y="5.793cm">
          <draw:text-box>
            <text:p><text:span text:style-name="T2">[1]</text:span></text:p>
          </draw:text-box>
        </draw:frame>
        <draw:frame draw:style-name="gr3" draw:text-style-name="P5" draw:layer="layout" svg:width="0.883cm" svg:height="0.494cm" svg:x="26.035cm" svg:y="12.7cm">
          <draw:text-box>
            <text:p><text:span text:style-name="T2">[2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>
            <draw:text-box>
              <text:list text:style-name="L1">
                <text:list-item>
                  <text:p text:style-name="P13"><text:span text:style-name="T5">Reliability: Avoid memory-safety errors, more robust code </text:span><text:span text:style-name="T5">due to good type system</text:span></text:p>
                </text:list-item>
                <text:list-item>
                  <text:p text:style-name="P13"><text:span text:style-name="T5">Performance: Compiled language which can achieve </text:span><text:span text:style-name="T5">similar performance characteristics as C (native </text:span><text:span text:style-name="T5">performance)</text:span></text:p>
                </text:list-item>
                <text:list-item>
                  <text:p text:style-name="P13"><text:span text:style-name="T6">Productivity: After the initial learning curve, you will be </text:span><text:span text:style-name="T6">faster than with other technologies, due to the excellent </text:span><text:span text:style-name="T6">tooling and the high trust you can put in compiling code. </text:span><text:span text:style-name="T5">Capable type-system with excellent modelling capabilities</text:span></text:p>
                </text:list-item>
              </text:list>
            </draw:text-box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Rust on Embedded</text:p>
          </draw:text-box>
        </draw:frame>
        <draw:frame presentation:style-name="pr5" draw:text-style-name="P15" draw:layer="layout" svg:width="19.05cm" svg:height="11.276cm" svg:x="1.471cm" svg:y="3.329cm" presentation:class="subtitle" presentation:user-transformed="true">
          <draw:text-box>
            <text:list text:style-name="L1">
              <text:list-item>
                <text:p text:style-name="P11"><text:span text:style-name="T4">Rust language design and capabilities make it viable for embedded!</text:span></text:p>
                <text:p text:style-name="P11"><text:span text:style-name="T4"/></text:p>
              </text:list-item>
            </text:list>
          </draw:text-box>
        </draw:frame>
        <draw:frame draw:style-name="gr1" draw:text-style-name="P2" draw:layer="layout" svg:width="3.597cm" svg:height="3.597cm" svg:x="22.86cm" svg:y="5.08cm">
          <draw:image xlink:href="Pictures/10000001000000880000008850D49839.png" xlink:type="simple" xlink:show="embed" xlink:actuate="onLoad" draw:mime-type="image/png">
            <text:p/>
          </draw:image>
        </draw:frame>
        <draw:frame draw:style-name="gr7" draw:text-style-name="P17" draw:layer="layout" svg:width="22.225cm" svg:height="9.059cm" svg:x="1.27cm" svg:y="5.715cm">
          <draw:text-box>
            <text:list text:style-name="L1">
              <text:list-item>
                <text:p text:style-name="P16"><text:span text:style-name="T4">Embedded Rust is generally supported on all LLVM supported architectures</text:span></text:p>
              </text:list-item>
              <text:list-item>
                <text:p text:style-name="P16"><text:span text:style-name="T4">The Rust ecosystem for the most commonly used architectures and microcontroller vendors is excellent, and is free open-source software!</text:span></text:p>
              </text:list-item>
              <text:list-item>
                <text:p text:style-name="P16"><text:span text:style-name="T4">We are working on improving that ecosystem for more exotic vendors</text:span></text:p>
              </text:list-item>
            </text:list>
          </draw:text-box>
        </draw:frame>
        <draw:frame draw:style-name="gr3" draw:text-style-name="P5" draw:layer="layout" svg:width="0.883cm" svg:height="0.494cm" svg:x="26.096cm" svg:y="4.746cm">
          <draw:text-box>
            <text:p><text:span text:style-name="T2">[1]</text:span></text:p>
          </draw:text-box>
        </draw:frame>
        <draw:frame draw:style-name="gr8" draw:text-style-name="P2" draw:layer="layout" svg:width="4.872cm" svg:height="3.585cm" svg:x="21.704cm" svg:y="0.944cm">
          <draw:image xlink:href="Pictures/10000001000003CA000002D8FE7052DE.png" xlink:type="simple" xlink:show="embed" xlink:actuate="onLoad" draw:mime-type="image/png">
            <text:p/>
          </draw:image>
        </draw:frame>
        <draw:frame draw:style-name="gr9" draw:text-style-name="P5" draw:layer="layout" svg:width="7.742cm" svg:height="0.977cm" svg:x="20.569cm" svg:y="14.687cm">
          <draw:text-box>
            <text:p text:style-name="P18"><text:span text:style-name="T2">[1] </text:span><text:span text:style-name="T2"><text:a xlink:href="https://cdn-shop.adafruit.com/970x728/4781-04.jpg" xlink:type="simple">https://cdn-shop.adafruit.com/970x728/4781-04.jpg</text:a></text:span><text:span text:style-name="T2"><text:line-break/></text:span><text:span text:style-name="T2">[2] LLVM dragon logo — llvm.org — Apache 2.0 w/ LLVM Exceptions (trademark: LLVM Project)</text:span></text:p>
          </draw:text-box>
        </draw:frame>
        <draw:frame draw:style-name="gr3" draw:text-style-name="P5" draw:layer="layout" svg:width="0.883cm" svg:height="0.494cm" svg:x="26.157cm" svg:y="8.438cm">
          <draw:text-box>
            <text:p><text:span text:style-name="T2">[2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1.905cm" svg:y="14.576cm" presentation:class="notes" presentation:user-transformed="true">
            <draw:text-box>
              <text:list text:style-name="L1">
                <text:list-item>
                  <text:p><text:s/>Rust is a compiled high-performance language with allows low-level memory control</text:p>
                </text:list-item>
                <text:list-item>
                  <text:p><text:s/>Rust uses the LLVM compiler backend</text:p>
                </text:list-item>
                <text:list-item>
                  <text:p><text:s/>LLVM supports a lot of architectures</text:p>
                </text:list-item>
                <text:list-item>
                  <text:p><text:s/>Common MCU architectures: ARM, RISC-V</text:p>
                </text:list-item>
                <text:list-item>
                  <text:p><text:s/>Common MCU vendors: STM32, nordic, espressif</text:p>
                </text:list-item>
                <text:list-item>
                  <text:p text:style-name="P19">Majority of is free open-source software</text:p>
                </text:list-item>
              </text:list>
            </draw:text-box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The Embedded Rust Ecosystem</text:p>
          </draw:text-box>
        </draw:frame>
        <draw:frame draw:style-name="gr1" draw:text-style-name="P2" draw:layer="layout" svg:width="3.81cm" svg:height="3.81cm" svg:x="22.86cm" svg:y="3.264cm">
          <draw:image xlink:href="Pictures/1000000100000100000001007653269C.png" xlink:type="simple" xlink:show="embed" xlink:actuate="onLoad" draw:mime-type="image/png">
            <text:p/>
          </draw:image>
        </draw:frame>
        <draw:frame draw:style-name="gr10" draw:text-style-name="P20" draw:layer="layout" svg:width="20.955cm" svg:height="10.16cm" svg:x="0.966cm" svg:y="3.537cm">
          <draw:text-box>
            <text:list text:style-name="L1">
              <text:list-item>
                <text:p text:style-name="P16"><text:span text:style-name="T4">The Embedded Rust Working Group maintains various “blessed” crates</text:span></text:p>
              </text:list-item>
              <text:list-item>
                <text:p text:style-name="P16"><text:span text:style-name="T4">The knurling-rs project also maintains various crates popular in the embedded Rust community, and there is even more</text:span></text:p>
              </text:list-item>
              <text:list-item>
                <text:p text:style-name="P16"><text:span text:style-name="T4">Examples: heapless, defmt, cortex-m-rt etc.</text:span></text:p>
              </text:list-item>
              <text:list-item>
                <text:p text:style-name="P16"><text:span text:style-name="T4">All of this is free open-source software as well!</text:span></text:p>
              </text:list-item>
            </text:list>
          </draw:text-box>
        </draw:frame>
        <draw:frame draw:style-name="gr11" draw:text-style-name="P5" draw:layer="layout" svg:width="3.678cm" svg:height="0.734cm" svg:x="23.349cm" svg:y="14.926cm">
          <draw:text-box>
            <text:p><text:span text:style-name="T3"><text:line-break/></text:span><text:span text:style-name="T3">[1] Embedded Rust — CC-B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21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9"><text:span text:style-name="T7">probe-rs is a capable flashing library and tool which also allow RAM manipulation</text:span></text:p>
                </text:list-item>
                <text:list-item>
                  <text:p text:style-name="P19"><text:span text:style-name="T7">defmt is an excellent logging library</text:span></text:p>
                </text:list-item>
                <text:list-item>
                  <text:p text:style-name="P19"><text:span text:style-name="T7">Cortex-m-rt crate was the scaffolding code which allows to run binaries on Cortex-M</text:span></text:p>
                </text:list-item>
                <text:list-item>
                  <text:p text:style-name="P19"><text:span text:style-name="T7">Heapless: Containers and data structures for embedded systems</text:span></text:p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The hardware</text:p>
          </draw:text-box>
        </draw:frame>
        <draw:frame draw:style-name="gr12" draw:text-style-name="P23" draw:layer="layout" svg:width="14.909cm" svg:height="11.264cm" svg:x="0.966cm" svg:y="3.175cm">
          <draw:text-box>
            <text:list text:style-name="L1">
              <text:list-item>
                <text:p text:style-name="P22"><text:span text:style-name="T4">The BBC micro:bit v2 is an educational board</text:span></text:p>
              </text:list-item>
              <text:list-item>
                <text:p text:style-name="P22"><text:span text:style-name="T4">It has everything we need: LEDs, on-board sensor, a serial port that we can use for communication with a PC</text:span></text:p>
              </text:list-item>
              <text:list-item>
                <text:p text:style-name="P22"><text:span text:style-name="T4">You only need a micro-USB cable to develop software</text:span></text:p>
              </text:list-item>
            </text:list>
          </draw:text-box>
        </draw:frame>
        <draw:frame draw:style-name="gr8" draw:text-style-name="P2" draw:layer="layout" svg:width="9.377cm" svg:height="6.9cm" svg:x="16.51cm" svg:y="3.895cm">
          <draw:image xlink:href="Pictures/10000001000003CA000002D8FE7052D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Embassy</text:p>
          </draw:text-box>
        </draw:frame>
        <draw:frame draw:style-name="gr13" draw:text-style-name="P20" draw:layer="layout" svg:width="25.704cm" svg:height="11.264cm" svg:x="0.966cm" svg:y="3.175cm">
          <draw:text-box>
            <text:list text:style-name="L1">
              <text:list-item>
                <text:p text:style-name="P24"><text:span text:style-name="T8">Embassy is a framework for embedded Rust supporting</text:span><text:span text:style-name="T8"><text:line-break/></text:span><text:span text:style-name="T4">asynchronous programming</text:span></text:p>
              </text:list-item>
              <text:list-item>
                <text:p text:style-name="P16"><text:span text:style-name="T4">It simplifies multi-tasking on microcontrollers by utilizing the </text:span><text:span text:style-name="T9">async</text:span><text:span text:style-name="T4"> / </text:span><text:span text:style-name="T9">await</text:span><text:span text:style-name="T4"> syntax integrated in Rust</text:span></text:p>
              </text:list-item>
              <text:list-item>
                <text:p text:style-name="P16"><text:span text:style-name="T4">Core components: Executor, time libraries and hardware abstraction layers (HALs)</text:span></text:p>
              </text:list-item>
              <text:list-item>
                <text:p text:style-name="P16"><text:span text:style-name="T4">Standard executor follows the co-operative multi-tasking model</text:span></text:p>
              </text:list-item>
              <text:list-item>
                <text:p text:style-name="P16"><text:span text:style-name="T4">Interrupt executor allows pre-emption with task priorit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Goal of this workshop</text:p>
          </draw:text-box>
        </draw:frame>
        <draw:frame draw:style-name="gr10" draw:text-style-name="P27" draw:layer="layout" svg:width="20.955cm" svg:height="10.56cm" svg:x="1.27cm" svg:y="3.81cm">
          <draw:text-box>
            <text:list text:style-name="L1">
              <text:list-item>
                <text:p text:style-name="P25"><text:span text:style-name="T10">Extract relevant information from datasheets and/or schematics</text:span></text:p>
              </text:list-item>
              <text:list-item>
                <text:p text:style-name="P25"><text:span text:style-name="T10">Understand and work in embedded code using the embassy asynchronous runtime, which includes using the </text:span><text:span text:style-name="T11">async</text:span><text:span text:style-name="T10"> /</text:span><text:span text:style-name="T11"> await</text:span><text:span text:style-name="T10"> syntax</text:span></text:p>
              </text:list-item>
              <text:list-item>
                <text:p text:style-name="P26"><text:span text:style-name="T10">Work with a hardware abstraction layer (HAL) library</text:span></text:p>
              </text:list-item>
              <text:list-item>
                <text:p text:style-name="P26"><text:span text:style-name="T10">Work with some libraries and tools which are commonly used in the embedded Rust domain</text:span></text:p>
              </text:list-item>
              <text:list-item>
                <text:p text:style-name="P25"><text:span text:style-name="T10">Doing multi-tasking with embassy</text:span></text:p>
              </text:list-item>
              <text:list-item>
                <text:p text:style-name="P25"><text:span text:style-name="T10">Using embassy-time to perform delays and periodic operations or measure elapsed time.</text:span></text:p>
              </text:list-item>
              <text:list-item>
                <text:p text:style-name="P25"><text:span text:style-name="T10">Write drivers for simple sensors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21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9"><text:span text:style-name="T7">Peripheral examples: UART, SPI or Timer peripheral</text:span></text:p>
                </text:list-item>
                <text:list-item>
                  <text:p text:style-name="P19"><text:span text:style-name="T7">Processor: Cortex-M4 used on the microbit v2</text:span></text:p>
                </text:list-item>
                <text:list-item>
                  <text:p text:style-name="P19"><text:span text:style-name="T7">MCU: The microbit v2 uses the nRF52833</text:span></text:p>
                </text:list-item>
              </text:list>
            </draw:text-box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Non-goals and further materials</text:p>
          </draw:text-box>
        </draw:frame>
        <draw:frame draw:style-name="gr14" draw:text-style-name="P29" draw:layer="layout" svg:width="25.4cm" svg:height="10.178cm" svg:x="1.27cm" svg:y="3.81cm">
          <draw:text-box>
            <text:list text:style-name="L1">
              <text:list-item>
                <text:p text:style-name="P28"><text:span text:style-name="T12">This workshop has a </text:span><text:span text:style-name="T13">strong </text:span><text:span text:style-name="T14">focus on the practical side of writing embedded Rust.</text:span></text:p>
              </text:list-item>
              <text:list-item>
                <text:p text:style-name="P28"><text:span text:style-name="T12">This does not replace a solid theoretical foundation on Rust and on Embedded Systems.</text:span></text:p>
              </text:list-item>
              <text:list-item>
                <text:p text:style-name="P28"><text:span text:style-name="T12">However, you can still work through this workshop, but it might be harder or more confusing.</text:span></text:p>
              </text:list-item>
              <text:list-item>
                <text:p text:style-name="P28"><text:span text:style-name="T12">If you are a Rust beginner, working through the Rust book is </text:span><text:span text:style-name="T13">strongly</text:span><text:span text:style-name="T12"> recommended.</text:span></text:p>
              </text:list-item>
              <text:list-item>
                <text:p text:style-name="P28"><text:span text:style-name="T12">We will try to provide relevant embedded knowledge in the exercise materials.</text:span></text:p>
              </text:list-item>
              <text:list-item>
                <text:p text:style-name="P28"><text:span text:style-name="T12">Operations concept and software design guidelines are currently not an explicit part of the workshop, but might be added in the future.</text:span></text:p>
              </text:list-item>
              <text:list-item>
                <text:p text:style-name="P28"><text:span text:style-name="T12">The exercise book contains further material recommendat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21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9"><text:span text:style-name="T7">Operation concepts might be added in the future</text:span></text:p>
                </text:list-item>
              </text:list>
            </draw:text-box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Let’s start!</text:p>
          </draw:text-box>
        </draw:frame>
        <draw:frame draw:style-name="gr10" draw:text-style-name="P30" draw:layer="layout" svg:width="25.4cm" svg:height="10.16cm" svg:x="1.27cm" svg:y="3.81cm">
          <draw:text-box>
            <text:list text:style-name="L1">
              <text:list-item>
                <text:p text:style-name="P16"><text:span text:style-name="T7">Go to the exercise book which is hosted on</text:span><text:span text:style-name="T7"><text:line-break/></text:span><text:span text:style-name="T7"><text:a xlink:href="https://robamu.github.io/embedded-workshop/book/introduction.html" xlink:type="simple">https://robamu.github.io/embedded-workshop/book/introduction.html</text:a></text:span><text:span text:style-name="T7"> </text:span><text:span text:style-name="T7"><text:line-break/></text:span><text:span text:style-name="T7">and start with the preparation if you have not done it yet</text:span></text:p>
              </text:list-item>
              <text:list-item>
                <text:p text:style-name="P16"><text:span text:style-name="T7">The book contains all instructions to clone the exercise repository</text:span></text:p>
              </text:list-item>
              <text:list-item>
                <text:p text:style-name="P16"><text:span text:style-name="T7">The repository contains all components of this workshop</text:span></text:p>
              </text:list-item>
              <text:list-item>
                <text:p text:style-name="P16"><text:span text:style-name="T7">The source code for the exercise book is also part of the repository, but you can work with the hosted ver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21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9"><text:span text:style-name="T7">Primary workflow: Work with the exercise book and the exercise Rust app side-by-side</text:span></text:p>
                </text:list-item>
                <text:list-item>
                  <text:p text:style-name="P19"><text:span text:style-name="T7">Book contains instructions, intermediate solution, relevant theoretical knowledge etc.</text:span></text:p>
                </text:list-item>
                <text:list-item>
                  <text:p text:style-name="P19"><text:span text:style-name="T7">Rust app contains start code and solution. You should edit the start code file. The book contains more information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1T10:47:40.029296242</meta:creation-date>
    <dc:date>2026-07-01T11:40:30.356162755</dc:date>
    <meta:editing-duration>PT2H19M55S</meta:editing-duration>
    <meta:editing-cycles>29</meta:editing-cycles>
    <meta:generator>LibreOffice/26.2.3.2$Linux_X86_64 LibreOffice_project/70e089b17412e4cb7773e41413306b17a2328c34</meta:generator>
    <meta:document-statistic meta:object-count="76"/>
  </office:meta>
</office:document-meta>
</file>